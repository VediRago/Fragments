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9b22"/>
    </style:style>
    <style:style style:name="P2" style:family="paragraph" style:parent-style-name="Text_20_body">
      <style:paragraph-properties fo:text-align="left" style:justify-single-word="false" style:writing-mode="lr-tb"/>
      <style:text-properties officeooo:paragraph-rsid="000a0510"/>
    </style:style>
    <style:style style:name="P3" style:family="paragraph" style:parent-style-name="Text_20_body">
      <style:paragraph-properties fo:text-align="left" style:justify-single-word="false" style:writing-mode="lr-tb"/>
      <style:text-properties officeooo:rsid="0014dcd2" officeooo:paragraph-rsid="000a0510"/>
    </style:style>
    <style:style style:name="P4" style:family="paragraph" style:parent-style-name="Text_20_body">
      <style:paragraph-properties fo:text-align="left" style:justify-single-word="false" style:writing-mode="lr-tb"/>
      <style:text-properties officeooo:rsid="0016bb98" officeooo:paragraph-rsid="000a0510"/>
    </style:style>
    <style:style style:name="T1" style:family="text">
      <style:text-properties officeooo:rsid="00089b22"/>
    </style:style>
    <style:style style:name="T2" style:family="text">
      <style:text-properties officeooo:rsid="00087004"/>
    </style:style>
    <style:style style:name="T3" style:family="text">
      <style:text-properties officeooo:rsid="000a0510"/>
    </style:style>
    <style:style style:name="T4" style:family="text">
      <style:text-properties officeooo:rsid="00091426"/>
    </style:style>
    <style:style style:name="T5" style:family="text">
      <style:text-properties officeooo:rsid="0016bb98"/>
    </style:style>
    <style:style style:name="T6" style:family="text">
      <style:text-properties officeooo:rsid="0014dcd2"/>
    </style:style>
    <style:style style:name="T7" style:family="text">
      <style:text-properties officeooo:rsid="0016b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t’s the seams that guide her sight towards Sera’s body just ahead.</text:p>
      <text:p text:style-name="Text_20_body">Her back against the mainframe as her arms brace around her knees.</text:p>
      <text:p text:style-name="Text_20_body">Fingers slowly curl into a fist with the raise of her arm—</text:p>
      <text:p text:style-name="Text_20_body">“I”</text:p>
      <text:p text:style-name="Text_20_body">Slams it.<text:line-break/><text:line-break/>Launching the body forward, scattering tears with the impact.<text:line-break/><text:line-break/>“I grr” </text:p>
      <text:p text:style-name="Text_20_body">As she lifts her head opposing a tear sliding across her cheek—</text:p>
      <text:p text:style-name="Text_20_body">“ ”</text:p>
      <text:p text:style-name="Text_20_body">Her eyes open—</text:p>
      <text:p text:style-name="Text_20_body">“U”</text:p>
      <text:p text:style-name="Text_20_body">And slams it, her fist detaching <text:span text:style-name="T1">it</text:span><text:span text:style-name="T2"> from her face</text:span> as the back of <text:span text:style-name="T2">the</text:span> head <text:span text:style-name="T3">hits</text:span> against the machine.</text:p>
      <text:p text:style-name="P1"><text:span text:style-name="T1">And when</text:span> they meet</text:p>
      <text:p text:style-name="P1"><text:span text:style-name="T1">T</text:span>he vibration sooth<text:span text:style-name="T1">s</text:span> her.</text:p>
      <text:p text:style-name="Text_20_body">No tears.</text:p>
      <text:p text:style-name="Text_20_body">No hope.</text:p>
      <text:p text:style-name="Text_20_body">No strength.</text:p>
      <text:p text:style-name="Text_20_body">Just a blur until it all settles on Erit's body. </text:p>
      <text:p text:style-name="Text_20_body">“Ggnha”</text:p>
      <text:p text:style-name="Text_20_body">She <text:span text:style-name="T3">throws</text:span> the back of her head against <text:span text:style-name="T3">machine</text:span> rolling until it stops at the connection port on her arm. While her eyes gather the distance shes already li<text:span text:style-name="T4">ft</text:span>in<text:span text:style-name="T3">g</text:span> herself towards the table. Her fingers slide <text:span text:style-name="T4">gently</text:span> over Erit's arm until they<text:span text:style-name="T4"> </text:span>reach the cable. In one motion, turning hers while disconnecting.</text:p>
      <text:p text:style-name="Text_20_body"/>
      <text:p text:style-name="P2">It’s the seams that guide her sight toward a body just ahead.</text:p>
      <text:p text:style-name="P2">Her back against the mainframe as her arms brace around her knees.</text:p>
      <text:p text:style-name="P2">As each finger slowly curling into a fist—</text:p>
      <text:p text:style-name="P2">A tear slips as she raises her arm.</text:p>
      <text:p text:style-name="P2">“I—”</text:p>
      <text:p text:style-name="P2">Slams it.</text:p>
      <text:p text:style-name="P2">Bringing her forehead toward her knees.</text:p>
      <text:p text:style-name="P2">“I grr—”</text:p>
      <text:p text:style-name="P2"><text:soft-page-break/>As she lifts her head opposing the tear sliding across her cheek—</text:p>
      <text:p text:style-name="P2">“ ”</text:p>
      <text:p text:style-name="P2">She opens her eyes—</text:p>
      <text:p text:style-name="P2">“U.”</text:p>
      <text:p text:style-name="P2">And slams it.</text:p>
      <text:p text:style-name="P2">Detaching the tear as the back of her head leans against the machine.</text:p>
      <text:p text:style-name="P2">When they meet, the vibration starts soothing her.</text:p>
      <text:p text:style-name="P2">Almost free until she opens her eyes to the blinking lights taunting her.</text:p>
      <text:p text:style-name="P2">Her arms falter.</text:p>
      <text:p text:style-name="P2">No tears.</text:p>
      <text:p text:style-name="P2">No hope.</text:p>
      <text:p text:style-name="P2">No strength.</text:p>
      <text:p text:style-name="P2">A blur as her head rolls to her side.</text:p>
      <text:p text:style-name="P2">Resting against the vibration.</text:p>
      <text:p text:style-name="P2">They start to open.</text:p>
      <text:p text:style-name="P2">Eyes facing the connection port on her arm.</text:p>
      <text:p text:style-name="P2">Her legs start to wake up while her hands lift her body.</text:p>
      <text:p text:style-name="P2">Standing.</text:p>
      <text:p text:style-name="P2">Facing the screen flickering in her eyes.</text:p>
      <text:p text:style-name="P2">She’s static.</text:p>
      <text:p text:style-name="P2">Her arm slowly raises, grabbing the cable while the other twists to face it.</text:p>
      <text:p text:style-name="P2">In one motion—</text:p>
      <text:p text:style-name="P2"/>
      <text:p text:style-name="P2">“You know I don’t like these kinds of events, Mom.”</text:p>
      <text:p text:style-name="P2">“You know I don’t like these kinds of events…”</text:p>
      <text:p text:style-name="P2">Fingers adjusting fabric slipping from her shoulder.</text:p>
      <text:p text:style-name="P2">“You’ll survive.”</text:p>
      <text:p text:style-name="P2">Hands fastening something behind her neck.</text:p>
      <text:p text:style-name="P2">“Erit, stop shifting. You know this is important for your father.”</text:p>
      <text:p text:style-name="P2">A slight tap against her head.</text:p>
      <text:p text:style-name="P2">“Your family.”</text:p>
      <text:p text:style-name="P2">“I just don’t like these places, people are—”</text:p>
      <text:p text:style-name="P2"><text:soft-page-break/>“Weird!”</text:p>
      <text:p text:style-name="P2">“…weird.”</text:p>
      <text:p text:style-name="P2">Her mother gently pushes the hair behind her ear.</text:p>
      <text:p text:style-name="P2">“You’re spoiled, you know that?”</text:p>
      <text:p text:style-name="P2">Pulling her head back—</text:p>
      <text:p text:style-name="P2">“I’ll—”</text:p>
      <text:p text:style-name="P2">“Stay…”</text:p>
      <text:p text:style-name="P2">“Stay.”</text:p>
      <text:p text:style-name="P2">Pushing her mother away as she walks off.</text:p>
      <text:p text:style-name="P2">Shes slowly starts peeking behind a wall. </text:p>
      <text:p text:style-name="P2">“Sera!”</text:p>
      <text:p text:style-name="P2">A sudden shift now shows the ceiling.</text:p>
      <text:p text:style-name="P2">“Come down right this moment, young girl. Don’t make me go there.”</text:p>
      <text:p text:style-name="P2">As she tries extending her arm—</text:p>
      <text:p text:style-name="P2">there is no movement.</text:p>
      <text:p text:style-name="P2">A gasp.</text:p>
      <text:p text:style-name="P2">As hands fail to reach her throat.</text:p>
      <text:p text:style-name="P2">There’s no throat.</text:p>
      <text:p text:style-name="P2">No breath.</text:p>
      <text:p text:style-name="P2">Nothing.</text:p>
      <text:p text:style-name="P2">She surrenders as the familiar woman towers closer with each step.</text:p>
      <text:p text:style-name="P2">“Where were you?”</text:p>
      <text:p text:style-name="P2">Her eyes lock before moving away.</text:p>
      <text:p text:style-name="P2">“Dumdum!”</text:p>
      <text:p text:style-name="P2">“Dumdum…”</text:p>
      <text:p text:style-name="P2">As the woman glances back—</text:p>
      <text:p text:style-name="P2">“School day, you know that!”</text:p>
      <text:p text:style-name="P2">“I don’t...”</text:p>
      <text:p text:style-name="P2">“I don’t wanna!”</text:p>
      <text:p text:style-name="P2">She starts to fall but there is nothing to fall to—</text:p>
      <text:p text:style-name="P2">“...fearful of womanhood at the final hour, dear. You linger so long one might think this marriage burdens you terribly.”</text:p>
      <text:p text:style-name="P2"><text:soft-page-break/>A reflection she has seen countless times.</text:p>
      <text:p text:style-name="P2">“No, Vera. Quite the contrary.”</text:p>
      <text:p text:style-name="P2">“---- Quite the contrary...”</text:p>
      <text:p text:style-name="P2">With a smile that simply persists.</text:p>
      <text:p text:style-name="P2">“Nothing could mar this day. There is nothing…”</text:p>
      <text:p text:style-name="P2">Shoving a man against the wall as the tip of the gun presses against his chest.</text:p>
      <text:p text:style-name="P2">“Hey pretty guy, those pockets full?”</text:p>
      <text:p text:style-name="P2">“Hey pretty guy those pockets...”</text:p>
      <text:p text:style-name="P2">The barrel slides across his face stopping between the eyes.</text:p>
      <text:p text:style-name="P2">“The wall needs painting. I wouldn’t waste...”</text:p>
      <text:p text:style-name="P2">“The wall needs painting. I wouldn’t want to waste it with a shit brain like you.”</text:p>
      <text:p text:style-name="P2"><text:s/>Falling to her knees with a deafening blow.</text:p>
      <text:p text:style-name="P2">“<text:span text:style-name="T5">eeeeeeeeeee</text:span>—”</text:p>
      <text:p text:style-name="P2">“Huh....”</text:p>
      <text:p text:style-name="P2">“HUh!”</text:p>
      <text:p text:style-name="P2">“Julia lo—”</text:p>
      <text:p text:style-name="P2">As a sword comes thrusting out of her body <text:span text:style-name="T5">and s</text:span>he starts reeling in.</text:p>
      <text:p text:style-name="P2">“Does this mean it’s a big one da<text:span text:style-name="T5">d</text:span>?”</text:p>
      <text:p text:style-name="P2">“Does this mean...”</text:p>
      <text:p text:style-name="P3">Staring at a bright sky (all)</text:p>
      <text:p text:style-name="P2">A reflection <text:span text:style-name="T6">in</text:span> window <text:span text:style-name="T6">(kael)</text:span></text:p>
      <text:p text:style-name="P3">A <text:span text:style-name="T7">crown of flowers</text:span>(lucreta)</text:p>
      <text:p text:style-name="P2">A bloody hand(erit)</text:p>
      <text:p text:style-name="P3">A <text:span text:style-name="T7">ripple in.. </text:span>(sera)</text:p>
      <text:p text:style-name="P2">A <text:span text:style-name="T6">light(</text:span><text:span text:style-name="T7">ophthalmoscope near the eyes of hospital girls</text:span><text:span text:style-name="T6">)</text:span></text:p>
      <text:p text:style-name="P3">Hands</text:p>
      <text:p text:style-name="P3">Cars<text:span text:style-name="T7">(the word hospital girl will say after when watching at the window followed by… to show kael remains)</text:span></text:p>
      <text:p text:style-name="P3">People (Hospital girl says with … to show kael still somewhere)</text:p>
      <text:p text:style-name="P3">Light<text:span text:style-name="T7">( ophthalmoscope near the eyes of hospital girls)</text:span></text:p>
      <text:p text:style-name="P3">Black<text:span text:style-name="T7">(Kaels eyes)</text:span></text:p>
      <text:p text:style-name="P3">White<text:span text:style-name="T7">(Doctots garb)</text:span></text:p>
      <text:p text:style-name="P2"><text:soft-page-break/><text:span text:style-name="T6">“</text:span><text:span text:style-name="T7">Grey..</text:span></text:p>
      <text:p text:style-name="P2">The ophthalmoscope lowers from her eye.</text:p>
      <text:p text:style-name="P2">“Never seen those before.”</text:p>
      <text:p text:style-name="P2">As he slides his chair back to stand.</text:p>
      <text:p text:style-name="P2">“And it’s not even grey. It’s pale.”</text:p>
      <text:p text:style-name="P2">Shifting his shoulder while turning away.</text:p>
      <text:p text:style-name="P2">“I gotta say, you are quite the miracle, young lady.”</text:p>
      <text:p text:style-name="P2">“So I’m ok?” She looks at her feet, noise of life calling her attention.</text:p>
      <text:p text:style-name="P2">“How long have I been here anyway?” She moves her sight to the window.</text:p>
      <text:p text:style-name="P2">His eyes lift from the folder toward her while sliding a pen into his pocket.</text:p>
      <text:p text:style-name="P2">“Two days.”</text:p>
      <text:p text:style-name="P2">“I’m really out of words.”</text:p>
      <text:p text:style-name="P2">Rearranging his glasses <text:span text:style-name="T5">as </text:span>he walks toward the door.</text:p>
      <text:p text:style-name="P2">“You can go home now.”</text:p>
      <text:p text:style-name="P2">A hop and a few steps and she’s at the window.</text:p>
      <text:p text:style-name="P2">The People.</text:p>
      <text:p text:style-name="P2">The Traffic.</text:p>
      <text:p text:style-name="P2">The Stoplights.</text:p>
      <text:p text:style-name="P2">Cellphones.</text:p>
      <text:p text:style-name="P4">Cars...</text:p>
      <text:p text:style-name="P2">Light.</text:p>
      <text:p text:style-name="P2">“It <text:span text:style-name="T5">get it now</text:span>” as she lifts her head to see the <text:span text:style-name="T5">bright</text:span> sky.</text:p>
      <text:p text:style-name="P2"><text:span text:style-name="T5">T</text:span>he <text:span text:style-name="T5">doctor</text:span> <text:span text:style-name="T5">glaces over his shoulders stopping as he was about to leave the door.</text:span></text:p>
      <text:p text:style-name="P2">She murmurs, “It <text:span text:style-name="T5">never ends</text:span>”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17:36:26.146858900</meta:creation-date>
    <dc:date>2026-06-01T20:37:19.711871300</dc:date>
    <meta:editing-duration>P2DT2H20M49S</meta:editing-duration>
    <meta:editing-cycles>1</meta:editing-cycles>
    <meta:document-statistic meta:table-count="0" meta:image-count="0" meta:object-count="0" meta:page-count="5" meta:paragraph-count="143" meta:word-count="923" meta:character-count="5063" meta:non-whitespace-character-count="4283"/>
    <meta:generator>LibreOffice/26.2.3.2$Windows_X86_64 LibreOffice_project/70e089b17412e4cb7773e41413306b17a2328c34</meta:generator>
  </office:meta>
</office:document-meta>
</file>